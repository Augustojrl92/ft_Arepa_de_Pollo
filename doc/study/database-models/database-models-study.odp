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b1120" draw:fill-color="#0b1120" draw:textarea-horizontal-align="center" draw:textarea-vertical-align="middle" fo:padding-top="0.18cm" fo:padding-bottom="0.18cm" fo:padding-left="0.25cm" fo:padding-right="0.25cm"/>
    </style:style>
    <style:style style:name="gr2" style:family="graphic" style:parent-style-name="standard">
      <style:graphic-properties draw:stroke="none" svg:stroke-opacity="0%" draw:fill="none" draw:fill-color="#ffffff" draw:opacity="0%" fo:min-height="0.85cm"/>
    </style:style>
    <style:style style:name="gr3" style:family="graphic" style:parent-style-name="standard">
      <style:graphic-properties svg:stroke-color="#76c8ff" draw:fill-color="#76c8ff" draw:textarea-horizontal-align="center" draw:textarea-vertical-align="middle" fo:padding-top="0.18cm" fo:padding-bottom="0.18cm" fo:padding-left="0.25cm" fo:padding-right="0.25cm"/>
    </style:style>
    <style:style style:name="gr4" style:family="graphic" style:parent-style-name="standard">
      <style:graphic-properties draw:stroke="none" svg:stroke-opacity="0%" draw:fill="none" draw:fill-color="#ffffff" draw:opacity="0%" fo:min-height="1.15cm"/>
    </style:style>
    <style:style style:name="gr5" style:family="graphic" style:parent-style-name="standard">
      <style:graphic-properties svg:stroke-color="#2a4a73" draw:fill-color="#12203a" draw:textarea-horizontal-align="center" draw:textarea-vertical-align="middle" fo:padding-top="0.18cm" fo:padding-bottom="0.18cm" fo:padding-left="0.25cm" fo:padding-right="0.25cm"/>
    </style:style>
    <style:style style:name="gr6" style:family="graphic" style:parent-style-name="standard">
      <style:graphic-properties draw:stroke="none" svg:stroke-opacity="0%" draw:fill="none" draw:fill-color="#ffffff" draw:opacity="0%" fo:min-height="0.45cm"/>
    </style:style>
    <style:style style:name="gr7" style:family="graphic" style:parent-style-name="standard">
      <style:graphic-properties draw:stroke="none" svg:stroke-opacity="0%" draw:fill="none" draw:fill-color="#ffffff" draw:opacity="0%" fo:min-height="4.75cm"/>
    </style:style>
    <style:style style:name="gr8" style:family="graphic" style:parent-style-name="standard">
      <style:graphic-properties svg:stroke-color="#2a4a73" draw:fill-color="#0f1a31" draw:textarea-horizontal-align="center" draw:textarea-vertical-align="middle" fo:padding-top="0.18cm" fo:padding-bottom="0.18cm" fo:padding-left="0.25cm" fo:padding-right="0.25cm"/>
    </style:style>
    <style:style style:name="gr9" style:family="graphic" style:parent-style-name="standard">
      <style:graphic-properties draw:stroke="none" svg:stroke-opacity="0%" draw:fill="none" draw:fill-color="#ffffff" draw:opacity="0%" fo:min-height="0.2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opacity="0%" draw:fill="none" draw:fill-color="#ffffff" draw:opacity="0%" fo:min-height="0.35cm"/>
    </style:style>
    <style:style style:name="gr12" style:family="graphic" style:parent-style-name="standard">
      <style:graphic-properties draw:stroke="none" svg:stroke-opacity="0%" draw:fill="none" draw:fill-color="#ffffff" draw:opacity="0%" fo:min-height="0.8cm"/>
    </style:style>
    <style:style style:name="gr13" style:family="graphic" style:parent-style-name="standard">
      <style:graphic-properties svg:stroke-color="#8cf1c7" draw:fill-color="#8cf1c7" draw:textarea-horizontal-align="center" draw:textarea-vertical-align="middle" fo:padding-top="0.18cm" fo:padding-bottom="0.18cm" fo:padding-left="0.25cm" fo:padding-right="0.25cm"/>
    </style:style>
    <style:style style:name="gr14" style:family="graphic" style:parent-style-name="standard">
      <style:graphic-properties svg:stroke-color="#ffd47e" draw:fill-color="#ffd47e" draw:textarea-horizontal-align="center" draw:textarea-vertical-align="middle" fo:padding-top="0.18cm" fo:padding-bottom="0.18cm" fo:padding-left="0.25cm" fo:padding-right="0.25cm"/>
    </style:style>
    <style:style style:name="gr15" style:family="graphic" style:parent-style-name="standard">
      <style:graphic-properties svg:stroke-color="#bba4ff" draw:fill-color="#bba4ff" draw:textarea-horizontal-align="center" draw:textarea-vertical-align="middle" fo:padding-top="0.18cm" fo:padding-bottom="0.18cm" fo:padding-left="0.25cm" fo:padding-right="0.25cm"/>
    </style:style>
    <style:style style:name="gr16" style:family="graphic" style:parent-style-name="standard">
      <style:graphic-properties svg:stroke-color="#ff9a9a" draw:fill-color="#ff9a9a" draw:textarea-horizontal-align="center" draw:textarea-vertical-align="middle" fo:padding-top="0.18cm" fo:padding-bottom="0.18cm" fo:padding-left="0.25cm" fo:padding-right="0.25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0b1120"/>
      <style:paragraph-properties fo:text-align="center"/>
    </style:style>
    <style:style style:name="P3" style:family="paragraph">
      <loext:graphic-properties draw:fill="none" draw:fill-color="#ffffff" draw:opacity="0%"/>
    </style:style>
    <style:style style:name="P4" style:family="paragraph">
      <loext:graphic-properties draw:fill-color="#76c8ff"/>
      <style:paragraph-properties fo:text-align="center"/>
    </style:style>
    <style:style style:name="P5" style:family="paragraph">
      <loext:graphic-properties draw:fill-color="#12203a"/>
      <style:paragraph-properties fo:text-align="center"/>
    </style:style>
    <style:style style:name="P6" style:family="paragraph">
      <loext:graphic-properties draw:fill-color="#0f1a31"/>
      <style:paragraph-properties fo:text-align="center"/>
    </style:style>
    <style:style style:name="P7" style:family="paragraph">
      <loext:graphic-properties draw:fill-color="#8cf1c7"/>
      <style:paragraph-properties fo:text-align="center"/>
    </style:style>
    <style:style style:name="P8" style:family="paragraph">
      <loext:graphic-properties draw:fill-color="#ffd47e"/>
      <style:paragraph-properties fo:text-align="center"/>
    </style:style>
    <style:style style:name="P9" style:family="paragraph">
      <loext:graphic-properties draw:fill-color="#bba4ff"/>
      <style:paragraph-properties fo:text-align="center"/>
    </style:style>
    <style:style style:name="P10" style:family="paragraph">
      <loext:graphic-properties draw:fill-color="#ff9a9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rect draw:style-name="gr1" draw:text-style-name="P2" draw:layer="layout" svg:width="28cm" svg:height="15.75cm" svg:x="0cm" svg:y="0cm">
          <text:p/>
        </draw:rect>
        <draw:frame draw:style-name="gr2" draw:text-style-name="P3" draw:layer="layout" svg:width="22cm" svg:height="1.1cm" svg:x="1.1cm" svg:y="0.75cm">
          <draw:text-box>
            <text:p/>
          </draw:text-box>
        </draw:frame>
        <draw:rect draw:style-name="gr3" draw:text-style-name="P4" draw:layer="layout" svg:width="1.8cm" svg:height="0.12cm" svg:x="1.1cm" svg:y="1.75cm" draw:corner-radius="0.06cm">
          <text:p/>
        </draw:rect>
        <draw:frame draw:style-name="gr4" draw:text-style-name="P3" draw:layer="layout" svg:width="24cm" svg:height="1.4cm" svg:x="1.1cm" svg:y="2.05cm">
          <draw:text-box>
            <text:p/>
          </draw:text-box>
        </draw:frame>
        <draw:rect draw:style-name="gr5" draw:text-style-name="P5" draw:layer="layout" svg:width="12cm" svg:height="7cm" svg:x="1.1cm" svg:y="3.8cm" draw:corner-radius="0.35cm">
          <text:p/>
        </draw:rect>
        <draw:frame draw:style-name="gr6" draw:text-style-name="P3" draw:layer="layout" svg:width="11.2cm" svg:height="0.7cm" svg:x="1.5cm" svg:y="4.3cm">
          <draw:text-box>
            <text:p/>
          </draw:text-box>
        </draw:frame>
        <draw:frame draw:style-name="gr7" draw:text-style-name="P3" draw:layer="layout" svg:width="11cm" svg:height="5cm" svg:x="1.5cm" svg:y="5.1cm">
          <draw:text-box>
            <text:p/>
          </draw:text-box>
        </draw:frame>
        <draw:rect draw:style-name="gr8" draw:text-style-name="P6" draw:layer="layout" svg:width="12.3cm" svg:height="7cm" svg:x="14.5cm" svg:y="3.8cm" draw:corner-radius="0.35cm">
          <text:p/>
        </draw:rect>
        <draw:frame draw:style-name="gr6" draw:text-style-name="P3" draw:layer="layout" svg:width="11.5cm" svg:height="0.7cm" svg:x="14.9cm" svg:y="4.3cm">
          <draw:text-box>
            <text:p/>
          </draw:text-box>
        </draw:frame>
        <draw:frame draw:style-name="gr7" draw:text-style-name="P3" draw:layer="layout" svg:width="11.2cm" svg:height="5cm" svg:x="14.9cm" svg:y="5.2cm">
          <draw:text-box>
            <text:p/>
          </draw:text-box>
        </draw:frame>
        <draw:frame draw:style-name="gr9" draw:text-style-name="P3" draw:layer="layout" svg:width="22cm" svg:height="0.5cm" svg:x="1.1cm" svg:y="14.7cm">
          <draw:text-box>
            <text:p/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" draw:text-style-name="P2" draw:layer="layout" svg:width="28cm" svg:height="15.75cm" svg:x="0cm" svg:y="0cm">
          <text:p/>
        </draw:rect>
        <draw:frame draw:style-name="gr2" draw:text-style-name="P3" draw:layer="layout" svg:width="22cm" svg:height="1.1cm" svg:x="1.1cm" svg:y="0.75cm">
          <draw:text-box>
            <text:p/>
          </draw:text-box>
        </draw:frame>
        <draw:rect draw:style-name="gr3" draw:text-style-name="P4" draw:layer="layout" svg:width="1.8cm" svg:height="0.12cm" svg:x="1.1cm" svg:y="1.75cm" draw:corner-radius="0.06cm">
          <text:p/>
        </draw:rect>
        <draw:frame draw:style-name="gr4" draw:text-style-name="P3" draw:layer="layout" svg:width="24cm" svg:height="1.4cm" svg:x="1.1cm" svg:y="2.05cm">
          <draw:text-box>
            <text:p/>
          </draw:text-box>
        </draw:frame>
        <draw:rect draw:style-name="gr5" draw:text-style-name="P5" draw:layer="layout" svg:width="12.25cm" svg:height="2.35cm" svg:x="1.1cm" svg:y="3.6cm" draw:corner-radius="0.35cm">
          <text:p/>
        </draw:rect>
        <draw:rect draw:style-name="gr3" draw:text-style-name="P4" draw:layer="layout" svg:width="0.9cm" svg:height="0.11cm" svg:x="1.35cm" svg:y="3.86cm" draw:corner-radius="0.055cm">
          <text:p/>
        </draw:rect>
        <draw:frame draw:style-name="gr11" draw:text-style-name="P3" draw:layer="layout" svg:width="11.75cm" svg:height="0.6cm" svg:x="1.35cm" svg:y="4.07cm">
          <draw:text-box>
            <text:p/>
          </draw:text-box>
        </draw:frame>
        <draw:frame draw:style-name="gr12" draw:text-style-name="P3" draw:layer="layout" svg:width="11.75cm" svg:height="1.05cm" svg:x="1.35cm" svg:y="4.58cm">
          <draw:text-box>
            <text:p/>
          </draw:text-box>
        </draw:frame>
        <draw:rect draw:style-name="gr5" draw:text-style-name="P5" draw:layer="layout" svg:width="12.25cm" svg:height="2.35cm" svg:x="14.55cm" svg:y="3.6cm" draw:corner-radius="0.35cm">
          <text:p/>
        </draw:rect>
        <draw:rect draw:style-name="gr13" draw:text-style-name="P7" draw:layer="layout" svg:width="0.9cm" svg:height="0.11cm" svg:x="14.8cm" svg:y="3.86cm" draw:corner-radius="0.055cm">
          <text:p/>
        </draw:rect>
        <draw:frame draw:style-name="gr11" draw:text-style-name="P3" draw:layer="layout" svg:width="11.75cm" svg:height="0.6cm" svg:x="14.8cm" svg:y="4.07cm">
          <draw:text-box>
            <text:p/>
          </draw:text-box>
        </draw:frame>
        <draw:frame draw:style-name="gr12" draw:text-style-name="P3" draw:layer="layout" svg:width="11.75cm" svg:height="1.05cm" svg:x="14.8cm" svg:y="4.58cm">
          <draw:text-box>
            <text:p/>
          </draw:text-box>
        </draw:frame>
        <draw:rect draw:style-name="gr5" draw:text-style-name="P5" draw:layer="layout" svg:width="12.25cm" svg:height="2.35cm" svg:x="1.1cm" svg:y="6.25cm" draw:corner-radius="0.35cm">
          <text:p/>
        </draw:rect>
        <draw:rect draw:style-name="gr14" draw:text-style-name="P8" draw:layer="layout" svg:width="0.9cm" svg:height="0.11cm" svg:x="1.35cm" svg:y="6.51cm" draw:corner-radius="0.055cm">
          <text:p/>
        </draw:rect>
        <draw:frame draw:style-name="gr11" draw:text-style-name="P3" draw:layer="layout" svg:width="11.75cm" svg:height="0.6cm" svg:x="1.35cm" svg:y="6.72cm">
          <draw:text-box>
            <text:p/>
          </draw:text-box>
        </draw:frame>
        <draw:frame draw:style-name="gr12" draw:text-style-name="P3" draw:layer="layout" svg:width="11.75cm" svg:height="1.05cm" svg:x="1.35cm" svg:y="7.23cm">
          <draw:text-box>
            <text:p/>
          </draw:text-box>
        </draw:frame>
        <draw:rect draw:style-name="gr5" draw:text-style-name="P5" draw:layer="layout" svg:width="12.25cm" svg:height="2.35cm" svg:x="14.55cm" svg:y="6.25cm" draw:corner-radius="0.35cm">
          <text:p/>
        </draw:rect>
        <draw:rect draw:style-name="gr15" draw:text-style-name="P9" draw:layer="layout" svg:width="0.9cm" svg:height="0.11cm" svg:x="14.8cm" svg:y="6.51cm" draw:corner-radius="0.055cm">
          <text:p/>
        </draw:rect>
        <draw:frame draw:style-name="gr11" draw:text-style-name="P3" draw:layer="layout" svg:width="11.75cm" svg:height="0.6cm" svg:x="14.8cm" svg:y="6.72cm">
          <draw:text-box>
            <text:p/>
          </draw:text-box>
        </draw:frame>
        <draw:frame draw:style-name="gr12" draw:text-style-name="P3" draw:layer="layout" svg:width="11.75cm" svg:height="1.05cm" svg:x="14.8cm" svg:y="7.23cm">
          <draw:text-box>
            <text:p/>
          </draw:text-box>
        </draw:frame>
        <draw:frame draw:style-name="gr9" draw:text-style-name="P3" draw:layer="layout" svg:width="22cm" svg:height="0.5cm" svg:x="1.1cm" svg:y="14.7cm">
          <draw:text-box>
            <text:p/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rect draw:style-name="gr1" draw:text-style-name="P2" draw:layer="layout" svg:width="28cm" svg:height="15.75cm" svg:x="0cm" svg:y="0cm">
          <text:p/>
        </draw:rect>
        <draw:frame draw:style-name="gr2" draw:text-style-name="P3" draw:layer="layout" svg:width="22cm" svg:height="1.1cm" svg:x="1.1cm" svg:y="0.75cm">
          <draw:text-box>
            <text:p/>
          </draw:text-box>
        </draw:frame>
        <draw:rect draw:style-name="gr3" draw:text-style-name="P4" draw:layer="layout" svg:width="1.8cm" svg:height="0.12cm" svg:x="1.1cm" svg:y="1.75cm" draw:corner-radius="0.06cm">
          <text:p/>
        </draw:rect>
        <draw:frame draw:style-name="gr4" draw:text-style-name="P3" draw:layer="layout" svg:width="24cm" svg:height="1.4cm" svg:x="1.1cm" svg:y="2.05cm">
          <draw:text-box>
            <text:p/>
          </draw:text-box>
        </draw:frame>
        <draw:rect draw:style-name="gr5" draw:text-style-name="P5" draw:layer="layout" svg:width="12.25cm" svg:height="2.35cm" svg:x="1.1cm" svg:y="3.6cm" draw:corner-radius="0.35cm">
          <text:p/>
        </draw:rect>
        <draw:rect draw:style-name="gr3" draw:text-style-name="P4" draw:layer="layout" svg:width="0.9cm" svg:height="0.11cm" svg:x="1.35cm" svg:y="3.86cm" draw:corner-radius="0.055cm">
          <text:p/>
        </draw:rect>
        <draw:frame draw:style-name="gr11" draw:text-style-name="P3" draw:layer="layout" svg:width="11.75cm" svg:height="0.6cm" svg:x="1.35cm" svg:y="4.07cm">
          <draw:text-box>
            <text:p/>
          </draw:text-box>
        </draw:frame>
        <draw:frame draw:style-name="gr12" draw:text-style-name="P3" draw:layer="layout" svg:width="11.75cm" svg:height="1.05cm" svg:x="1.35cm" svg:y="4.58cm">
          <draw:text-box>
            <text:p/>
          </draw:text-box>
        </draw:frame>
        <draw:rect draw:style-name="gr5" draw:text-style-name="P5" draw:layer="layout" svg:width="12.25cm" svg:height="2.35cm" svg:x="14.55cm" svg:y="3.6cm" draw:corner-radius="0.35cm">
          <text:p/>
        </draw:rect>
        <draw:rect draw:style-name="gr13" draw:text-style-name="P7" draw:layer="layout" svg:width="0.9cm" svg:height="0.11cm" svg:x="14.8cm" svg:y="3.86cm" draw:corner-radius="0.055cm">
          <text:p/>
        </draw:rect>
        <draw:frame draw:style-name="gr11" draw:text-style-name="P3" draw:layer="layout" svg:width="11.75cm" svg:height="0.6cm" svg:x="14.8cm" svg:y="4.07cm">
          <draw:text-box>
            <text:p/>
          </draw:text-box>
        </draw:frame>
        <draw:frame draw:style-name="gr12" draw:text-style-name="P3" draw:layer="layout" svg:width="11.75cm" svg:height="1.05cm" svg:x="14.8cm" svg:y="4.58cm">
          <draw:text-box>
            <text:p/>
          </draw:text-box>
        </draw:frame>
        <draw:rect draw:style-name="gr5" draw:text-style-name="P5" draw:layer="layout" svg:width="12.25cm" svg:height="2.35cm" svg:x="1.1cm" svg:y="6.25cm" draw:corner-radius="0.35cm">
          <text:p/>
        </draw:rect>
        <draw:rect draw:style-name="gr14" draw:text-style-name="P8" draw:layer="layout" svg:width="0.9cm" svg:height="0.11cm" svg:x="1.35cm" svg:y="6.51cm" draw:corner-radius="0.055cm">
          <text:p/>
        </draw:rect>
        <draw:frame draw:style-name="gr11" draw:text-style-name="P3" draw:layer="layout" svg:width="11.75cm" svg:height="0.6cm" svg:x="1.35cm" svg:y="6.72cm">
          <draw:text-box>
            <text:p/>
          </draw:text-box>
        </draw:frame>
        <draw:frame draw:style-name="gr12" draw:text-style-name="P3" draw:layer="layout" svg:width="11.75cm" svg:height="1.05cm" svg:x="1.35cm" svg:y="7.23cm">
          <draw:text-box>
            <text:p/>
          </draw:text-box>
        </draw:frame>
        <draw:rect draw:style-name="gr5" draw:text-style-name="P5" draw:layer="layout" svg:width="12.25cm" svg:height="2.35cm" svg:x="14.55cm" svg:y="6.25cm" draw:corner-radius="0.35cm">
          <text:p/>
        </draw:rect>
        <draw:rect draw:style-name="gr15" draw:text-style-name="P9" draw:layer="layout" svg:width="0.9cm" svg:height="0.11cm" svg:x="14.8cm" svg:y="6.51cm" draw:corner-radius="0.055cm">
          <text:p/>
        </draw:rect>
        <draw:frame draw:style-name="gr11" draw:text-style-name="P3" draw:layer="layout" svg:width="11.75cm" svg:height="0.6cm" svg:x="14.8cm" svg:y="6.72cm">
          <draw:text-box>
            <text:p/>
          </draw:text-box>
        </draw:frame>
        <draw:frame draw:style-name="gr12" draw:text-style-name="P3" draw:layer="layout" svg:width="11.75cm" svg:height="1.05cm" svg:x="14.8cm" svg:y="7.23cm">
          <draw:text-box>
            <text:p/>
          </draw:text-box>
        </draw:frame>
        <draw:frame draw:style-name="gr9" draw:text-style-name="P3" draw:layer="layout" svg:width="22cm" svg:height="0.5cm" svg:x="1.1cm" svg:y="14.7cm">
          <draw:text-box>
            <text:p/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rect draw:style-name="gr1" draw:text-style-name="P2" draw:layer="layout" svg:width="28cm" svg:height="15.75cm" svg:x="0cm" svg:y="0cm">
          <text:p/>
        </draw:rect>
        <draw:frame draw:style-name="gr2" draw:text-style-name="P3" draw:layer="layout" svg:width="22cm" svg:height="1.1cm" svg:x="1.1cm" svg:y="0.75cm">
          <draw:text-box>
            <text:p/>
          </draw:text-box>
        </draw:frame>
        <draw:rect draw:style-name="gr3" draw:text-style-name="P4" draw:layer="layout" svg:width="1.8cm" svg:height="0.12cm" svg:x="1.1cm" svg:y="1.75cm" draw:corner-radius="0.06cm">
          <text:p/>
        </draw:rect>
        <draw:frame draw:style-name="gr4" draw:text-style-name="P3" draw:layer="layout" svg:width="24cm" svg:height="1.4cm" svg:x="1.1cm" svg:y="2.05cm">
          <draw:text-box>
            <text:p/>
          </draw:text-box>
        </draw:frame>
        <draw:rect draw:style-name="gr5" draw:text-style-name="P5" draw:layer="layout" svg:width="12.25cm" svg:height="2.35cm" svg:x="1.1cm" svg:y="3.6cm" draw:corner-radius="0.35cm">
          <text:p/>
        </draw:rect>
        <draw:rect draw:style-name="gr3" draw:text-style-name="P4" draw:layer="layout" svg:width="0.9cm" svg:height="0.11cm" svg:x="1.35cm" svg:y="3.86cm" draw:corner-radius="0.055cm">
          <text:p/>
        </draw:rect>
        <draw:frame draw:style-name="gr11" draw:text-style-name="P3" draw:layer="layout" svg:width="11.75cm" svg:height="0.6cm" svg:x="1.35cm" svg:y="4.07cm">
          <draw:text-box>
            <text:p/>
          </draw:text-box>
        </draw:frame>
        <draw:frame draw:style-name="gr12" draw:text-style-name="P3" draw:layer="layout" svg:width="11.75cm" svg:height="1.05cm" svg:x="1.35cm" svg:y="4.58cm">
          <draw:text-box>
            <text:p/>
          </draw:text-box>
        </draw:frame>
        <draw:rect draw:style-name="gr5" draw:text-style-name="P5" draw:layer="layout" svg:width="12.25cm" svg:height="2.35cm" svg:x="14.55cm" svg:y="3.6cm" draw:corner-radius="0.35cm">
          <text:p/>
        </draw:rect>
        <draw:rect draw:style-name="gr16" draw:text-style-name="P10" draw:layer="layout" svg:width="0.9cm" svg:height="0.11cm" svg:x="14.8cm" svg:y="3.86cm" draw:corner-radius="0.055cm">
          <text:p/>
        </draw:rect>
        <draw:frame draw:style-name="gr11" draw:text-style-name="P3" draw:layer="layout" svg:width="11.75cm" svg:height="0.6cm" svg:x="14.8cm" svg:y="4.07cm">
          <draw:text-box>
            <text:p/>
          </draw:text-box>
        </draw:frame>
        <draw:frame draw:style-name="gr12" draw:text-style-name="P3" draw:layer="layout" svg:width="11.75cm" svg:height="1.05cm" svg:x="14.8cm" svg:y="4.58cm">
          <draw:text-box>
            <text:p/>
          </draw:text-box>
        </draw:frame>
        <draw:rect draw:style-name="gr5" draw:text-style-name="P5" draw:layer="layout" svg:width="12.25cm" svg:height="2.35cm" svg:x="1.1cm" svg:y="6.25cm" draw:corner-radius="0.35cm">
          <text:p/>
        </draw:rect>
        <draw:rect draw:style-name="gr13" draw:text-style-name="P7" draw:layer="layout" svg:width="0.9cm" svg:height="0.11cm" svg:x="1.35cm" svg:y="6.51cm" draw:corner-radius="0.055cm">
          <text:p/>
        </draw:rect>
        <draw:frame draw:style-name="gr11" draw:text-style-name="P3" draw:layer="layout" svg:width="11.75cm" svg:height="0.6cm" svg:x="1.35cm" svg:y="6.72cm">
          <draw:text-box>
            <text:p/>
          </draw:text-box>
        </draw:frame>
        <draw:frame draw:style-name="gr12" draw:text-style-name="P3" draw:layer="layout" svg:width="11.75cm" svg:height="1.05cm" svg:x="1.35cm" svg:y="7.23cm">
          <draw:text-box>
            <text:p/>
          </draw:text-box>
        </draw:frame>
        <draw:rect draw:style-name="gr5" draw:text-style-name="P5" draw:layer="layout" svg:width="12.25cm" svg:height="2.35cm" svg:x="14.55cm" svg:y="6.25cm" draw:corner-radius="0.35cm">
          <text:p/>
        </draw:rect>
        <draw:rect draw:style-name="gr14" draw:text-style-name="P8" draw:layer="layout" svg:width="0.9cm" svg:height="0.11cm" svg:x="14.8cm" svg:y="6.51cm" draw:corner-radius="0.055cm">
          <text:p/>
        </draw:rect>
        <draw:frame draw:style-name="gr11" draw:text-style-name="P3" draw:layer="layout" svg:width="11.75cm" svg:height="0.6cm" svg:x="14.8cm" svg:y="6.72cm">
          <draw:text-box>
            <text:p/>
          </draw:text-box>
        </draw:frame>
        <draw:frame draw:style-name="gr12" draw:text-style-name="P3" draw:layer="layout" svg:width="11.75cm" svg:height="1.05cm" svg:x="14.8cm" svg:y="7.23cm">
          <draw:text-box>
            <text:p/>
          </draw:text-box>
        </draw:frame>
        <draw:frame draw:style-name="gr9" draw:text-style-name="P3" draw:layer="layout" svg:width="22cm" svg:height="0.5cm" svg:x="1.1cm" svg:y="14.7cm">
          <draw:text-box>
            <text:p/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rect draw:style-name="gr1" draw:text-style-name="P2" draw:layer="layout" svg:width="28cm" svg:height="15.75cm" svg:x="0cm" svg:y="0cm">
          <text:p/>
        </draw:rect>
        <draw:frame draw:style-name="gr2" draw:text-style-name="P3" draw:layer="layout" svg:width="22cm" svg:height="1.1cm" svg:x="1.1cm" svg:y="0.75cm">
          <draw:text-box>
            <text:p/>
          </draw:text-box>
        </draw:frame>
        <draw:rect draw:style-name="gr3" draw:text-style-name="P4" draw:layer="layout" svg:width="1.8cm" svg:height="0.12cm" svg:x="1.1cm" svg:y="1.75cm" draw:corner-radius="0.06cm">
          <text:p/>
        </draw:rect>
        <draw:frame draw:style-name="gr4" draw:text-style-name="P3" draw:layer="layout" svg:width="24cm" svg:height="1.4cm" svg:x="1.1cm" svg:y="2.05cm">
          <draw:text-box>
            <text:p/>
          </draw:text-box>
        </draw:frame>
        <draw:rect draw:style-name="gr5" draw:text-style-name="P5" draw:layer="layout" svg:width="12.25cm" svg:height="2.35cm" svg:x="1.1cm" svg:y="3.6cm" draw:corner-radius="0.35cm">
          <text:p/>
        </draw:rect>
        <draw:rect draw:style-name="gr3" draw:text-style-name="P4" draw:layer="layout" svg:width="0.9cm" svg:height="0.11cm" svg:x="1.35cm" svg:y="3.86cm" draw:corner-radius="0.055cm">
          <text:p/>
        </draw:rect>
        <draw:frame draw:style-name="gr11" draw:text-style-name="P3" draw:layer="layout" svg:width="11.75cm" svg:height="0.6cm" svg:x="1.35cm" svg:y="4.07cm">
          <draw:text-box>
            <text:p/>
          </draw:text-box>
        </draw:frame>
        <draw:frame draw:style-name="gr12" draw:text-style-name="P3" draw:layer="layout" svg:width="11.75cm" svg:height="1.05cm" svg:x="1.35cm" svg:y="4.58cm">
          <draw:text-box>
            <text:p/>
          </draw:text-box>
        </draw:frame>
        <draw:rect draw:style-name="gr5" draw:text-style-name="P5" draw:layer="layout" svg:width="12.25cm" svg:height="2.35cm" svg:x="14.55cm" svg:y="3.6cm" draw:corner-radius="0.35cm">
          <text:p/>
        </draw:rect>
        <draw:rect draw:style-name="gr13" draw:text-style-name="P7" draw:layer="layout" svg:width="0.9cm" svg:height="0.11cm" svg:x="14.8cm" svg:y="3.86cm" draw:corner-radius="0.055cm">
          <text:p/>
        </draw:rect>
        <draw:frame draw:style-name="gr11" draw:text-style-name="P3" draw:layer="layout" svg:width="11.75cm" svg:height="0.6cm" svg:x="14.8cm" svg:y="4.07cm">
          <draw:text-box>
            <text:p/>
          </draw:text-box>
        </draw:frame>
        <draw:frame draw:style-name="gr12" draw:text-style-name="P3" draw:layer="layout" svg:width="11.75cm" svg:height="1.05cm" svg:x="14.8cm" svg:y="4.58cm">
          <draw:text-box>
            <text:p/>
          </draw:text-box>
        </draw:frame>
        <draw:rect draw:style-name="gr5" draw:text-style-name="P5" draw:layer="layout" svg:width="12.25cm" svg:height="2.35cm" svg:x="1.1cm" svg:y="6.25cm" draw:corner-radius="0.35cm">
          <text:p/>
        </draw:rect>
        <draw:rect draw:style-name="gr14" draw:text-style-name="P8" draw:layer="layout" svg:width="0.9cm" svg:height="0.11cm" svg:x="1.35cm" svg:y="6.51cm" draw:corner-radius="0.055cm">
          <text:p/>
        </draw:rect>
        <draw:frame draw:style-name="gr11" draw:text-style-name="P3" draw:layer="layout" svg:width="11.75cm" svg:height="0.6cm" svg:x="1.35cm" svg:y="6.72cm">
          <draw:text-box>
            <text:p/>
          </draw:text-box>
        </draw:frame>
        <draw:frame draw:style-name="gr12" draw:text-style-name="P3" draw:layer="layout" svg:width="11.75cm" svg:height="1.05cm" svg:x="1.35cm" svg:y="7.23cm">
          <draw:text-box>
            <text:p/>
          </draw:text-box>
        </draw:frame>
        <draw:rect draw:style-name="gr5" draw:text-style-name="P5" draw:layer="layout" svg:width="12.25cm" svg:height="2.35cm" svg:x="14.55cm" svg:y="6.25cm" draw:corner-radius="0.35cm">
          <text:p/>
        </draw:rect>
        <draw:rect draw:style-name="gr16" draw:text-style-name="P10" draw:layer="layout" svg:width="0.9cm" svg:height="0.11cm" svg:x="14.8cm" svg:y="6.51cm" draw:corner-radius="0.055cm">
          <text:p/>
        </draw:rect>
        <draw:frame draw:style-name="gr11" draw:text-style-name="P3" draw:layer="layout" svg:width="11.75cm" svg:height="0.6cm" svg:x="14.8cm" svg:y="6.72cm">
          <draw:text-box>
            <text:p/>
          </draw:text-box>
        </draw:frame>
        <draw:frame draw:style-name="gr12" draw:text-style-name="P3" draw:layer="layout" svg:width="11.75cm" svg:height="1.05cm" svg:x="14.8cm" svg:y="7.23cm">
          <draw:text-box>
            <text:p/>
          </draw:text-box>
        </draw:frame>
        <draw:frame draw:style-name="gr9" draw:text-style-name="P3" draw:layer="layout" svg:width="22cm" svg:height="0.5cm" svg:x="1.1cm" svg:y="14.7cm">
          <draw:text-box>
            <text:p/>
          </draw:text-box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rect draw:style-name="gr1" draw:text-style-name="P2" draw:layer="layout" svg:width="28cm" svg:height="15.75cm" svg:x="0cm" svg:y="0cm">
          <text:p/>
        </draw:rect>
        <draw:frame draw:style-name="gr2" draw:text-style-name="P3" draw:layer="layout" svg:width="22cm" svg:height="1.1cm" svg:x="1.1cm" svg:y="0.75cm">
          <draw:text-box>
            <text:p/>
          </draw:text-box>
        </draw:frame>
        <draw:rect draw:style-name="gr3" draw:text-style-name="P4" draw:layer="layout" svg:width="1.8cm" svg:height="0.12cm" svg:x="1.1cm" svg:y="1.75cm" draw:corner-radius="0.06cm">
          <text:p/>
        </draw:rect>
        <draw:frame draw:style-name="gr4" draw:text-style-name="P3" draw:layer="layout" svg:width="24cm" svg:height="1.4cm" svg:x="1.1cm" svg:y="2.05cm">
          <draw:text-box>
            <text:p/>
          </draw:text-box>
        </draw:frame>
        <draw:rect draw:style-name="gr5" draw:text-style-name="P5" draw:layer="layout" svg:width="12.25cm" svg:height="2.35cm" svg:x="1.1cm" svg:y="3.6cm" draw:corner-radius="0.35cm">
          <text:p/>
        </draw:rect>
        <draw:rect draw:style-name="gr3" draw:text-style-name="P4" draw:layer="layout" svg:width="0.9cm" svg:height="0.11cm" svg:x="1.35cm" svg:y="3.86cm" draw:corner-radius="0.055cm">
          <text:p/>
        </draw:rect>
        <draw:frame draw:style-name="gr11" draw:text-style-name="P3" draw:layer="layout" svg:width="11.75cm" svg:height="0.6cm" svg:x="1.35cm" svg:y="4.07cm">
          <draw:text-box>
            <text:p/>
          </draw:text-box>
        </draw:frame>
        <draw:frame draw:style-name="gr12" draw:text-style-name="P3" draw:layer="layout" svg:width="11.75cm" svg:height="1.05cm" svg:x="1.35cm" svg:y="4.58cm">
          <draw:text-box>
            <text:p/>
          </draw:text-box>
        </draw:frame>
        <draw:rect draw:style-name="gr5" draw:text-style-name="P5" draw:layer="layout" svg:width="12.25cm" svg:height="2.35cm" svg:x="14.55cm" svg:y="3.6cm" draw:corner-radius="0.35cm">
          <text:p/>
        </draw:rect>
        <draw:rect draw:style-name="gr13" draw:text-style-name="P7" draw:layer="layout" svg:width="0.9cm" svg:height="0.11cm" svg:x="14.8cm" svg:y="3.86cm" draw:corner-radius="0.055cm">
          <text:p/>
        </draw:rect>
        <draw:frame draw:style-name="gr11" draw:text-style-name="P3" draw:layer="layout" svg:width="11.75cm" svg:height="0.6cm" svg:x="14.8cm" svg:y="4.07cm">
          <draw:text-box>
            <text:p/>
          </draw:text-box>
        </draw:frame>
        <draw:frame draw:style-name="gr12" draw:text-style-name="P3" draw:layer="layout" svg:width="11.75cm" svg:height="1.05cm" svg:x="14.8cm" svg:y="4.58cm">
          <draw:text-box>
            <text:p/>
          </draw:text-box>
        </draw:frame>
        <draw:rect draw:style-name="gr5" draw:text-style-name="P5" draw:layer="layout" svg:width="12.25cm" svg:height="2.35cm" svg:x="1.1cm" svg:y="6.25cm" draw:corner-radius="0.35cm">
          <text:p/>
        </draw:rect>
        <draw:rect draw:style-name="gr14" draw:text-style-name="P8" draw:layer="layout" svg:width="0.9cm" svg:height="0.11cm" svg:x="1.35cm" svg:y="6.51cm" draw:corner-radius="0.055cm">
          <text:p/>
        </draw:rect>
        <draw:frame draw:style-name="gr11" draw:text-style-name="P3" draw:layer="layout" svg:width="11.75cm" svg:height="0.6cm" svg:x="1.35cm" svg:y="6.72cm">
          <draw:text-box>
            <text:p/>
          </draw:text-box>
        </draw:frame>
        <draw:frame draw:style-name="gr12" draw:text-style-name="P3" draw:layer="layout" svg:width="11.75cm" svg:height="1.05cm" svg:x="1.35cm" svg:y="7.23cm">
          <draw:text-box>
            <text:p/>
          </draw:text-box>
        </draw:frame>
        <draw:rect draw:style-name="gr5" draw:text-style-name="P5" draw:layer="layout" svg:width="12.25cm" svg:height="2.35cm" svg:x="14.55cm" svg:y="6.25cm" draw:corner-radius="0.35cm">
          <text:p/>
        </draw:rect>
        <draw:rect draw:style-name="gr16" draw:text-style-name="P10" draw:layer="layout" svg:width="0.9cm" svg:height="0.11cm" svg:x="14.8cm" svg:y="6.51cm" draw:corner-radius="0.055cm">
          <text:p/>
        </draw:rect>
        <draw:frame draw:style-name="gr11" draw:text-style-name="P3" draw:layer="layout" svg:width="11.75cm" svg:height="0.6cm" svg:x="14.8cm" svg:y="6.72cm">
          <draw:text-box>
            <text:p/>
          </draw:text-box>
        </draw:frame>
        <draw:frame draw:style-name="gr12" draw:text-style-name="P3" draw:layer="layout" svg:width="11.75cm" svg:height="1.05cm" svg:x="14.8cm" svg:y="7.23cm">
          <draw:text-box>
            <text:p/>
          </draw:text-box>
        </draw:frame>
        <draw:frame draw:style-name="gr9" draw:text-style-name="P3" draw:layer="layout" svg:width="22cm" svg:height="0.5cm" svg:x="1.1cm" svg:y="14.7cm">
          <draw:text-box>
            <text:p/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rect draw:style-name="gr1" draw:text-style-name="P2" draw:layer="layout" svg:width="28cm" svg:height="15.75cm" svg:x="0cm" svg:y="0cm">
          <text:p/>
        </draw:rect>
        <draw:frame draw:style-name="gr2" draw:text-style-name="P3" draw:layer="layout" svg:width="22cm" svg:height="1.1cm" svg:x="1.1cm" svg:y="0.75cm">
          <draw:text-box>
            <text:p/>
          </draw:text-box>
        </draw:frame>
        <draw:rect draw:style-name="gr3" draw:text-style-name="P4" draw:layer="layout" svg:width="1.8cm" svg:height="0.12cm" svg:x="1.1cm" svg:y="1.75cm" draw:corner-radius="0.06cm">
          <text:p/>
        </draw:rect>
        <draw:frame draw:style-name="gr4" draw:text-style-name="P3" draw:layer="layout" svg:width="24cm" svg:height="1.4cm" svg:x="1.1cm" svg:y="2.05cm">
          <draw:text-box>
            <text:p/>
          </draw:text-box>
        </draw:frame>
        <draw:rect draw:style-name="gr5" draw:text-style-name="P5" draw:layer="layout" svg:width="12.25cm" svg:height="2.35cm" svg:x="1.1cm" svg:y="3.6cm" draw:corner-radius="0.35cm">
          <text:p/>
        </draw:rect>
        <draw:rect draw:style-name="gr3" draw:text-style-name="P4" draw:layer="layout" svg:width="0.9cm" svg:height="0.11cm" svg:x="1.35cm" svg:y="3.86cm" draw:corner-radius="0.055cm">
          <text:p/>
        </draw:rect>
        <draw:frame draw:style-name="gr11" draw:text-style-name="P3" draw:layer="layout" svg:width="11.75cm" svg:height="0.6cm" svg:x="1.35cm" svg:y="4.07cm">
          <draw:text-box>
            <text:p/>
          </draw:text-box>
        </draw:frame>
        <draw:frame draw:style-name="gr12" draw:text-style-name="P3" draw:layer="layout" svg:width="11.75cm" svg:height="1.05cm" svg:x="1.35cm" svg:y="4.58cm">
          <draw:text-box>
            <text:p/>
          </draw:text-box>
        </draw:frame>
        <draw:rect draw:style-name="gr5" draw:text-style-name="P5" draw:layer="layout" svg:width="12.25cm" svg:height="2.35cm" svg:x="14.55cm" svg:y="3.6cm" draw:corner-radius="0.35cm">
          <text:p/>
        </draw:rect>
        <draw:rect draw:style-name="gr13" draw:text-style-name="P7" draw:layer="layout" svg:width="0.9cm" svg:height="0.11cm" svg:x="14.8cm" svg:y="3.86cm" draw:corner-radius="0.055cm">
          <text:p/>
        </draw:rect>
        <draw:frame draw:style-name="gr11" draw:text-style-name="P3" draw:layer="layout" svg:width="11.75cm" svg:height="0.6cm" svg:x="14.8cm" svg:y="4.07cm">
          <draw:text-box>
            <text:p/>
          </draw:text-box>
        </draw:frame>
        <draw:frame draw:style-name="gr12" draw:text-style-name="P3" draw:layer="layout" svg:width="11.75cm" svg:height="1.05cm" svg:x="14.8cm" svg:y="4.58cm">
          <draw:text-box>
            <text:p/>
          </draw:text-box>
        </draw:frame>
        <draw:rect draw:style-name="gr5" draw:text-style-name="P5" draw:layer="layout" svg:width="12.25cm" svg:height="2.35cm" svg:x="1.1cm" svg:y="6.25cm" draw:corner-radius="0.35cm">
          <text:p/>
        </draw:rect>
        <draw:rect draw:style-name="gr14" draw:text-style-name="P8" draw:layer="layout" svg:width="0.9cm" svg:height="0.11cm" svg:x="1.35cm" svg:y="6.51cm" draw:corner-radius="0.055cm">
          <text:p/>
        </draw:rect>
        <draw:frame draw:style-name="gr11" draw:text-style-name="P3" draw:layer="layout" svg:width="11.75cm" svg:height="0.6cm" svg:x="1.35cm" svg:y="6.72cm">
          <draw:text-box>
            <text:p/>
          </draw:text-box>
        </draw:frame>
        <draw:frame draw:style-name="gr12" draw:text-style-name="P3" draw:layer="layout" svg:width="11.75cm" svg:height="1.05cm" svg:x="1.35cm" svg:y="7.23cm">
          <draw:text-box>
            <text:p/>
          </draw:text-box>
        </draw:frame>
        <draw:rect draw:style-name="gr5" draw:text-style-name="P5" draw:layer="layout" svg:width="12.25cm" svg:height="2.35cm" svg:x="14.55cm" svg:y="6.25cm" draw:corner-radius="0.35cm">
          <text:p/>
        </draw:rect>
        <draw:rect draw:style-name="gr16" draw:text-style-name="P10" draw:layer="layout" svg:width="0.9cm" svg:height="0.11cm" svg:x="14.8cm" svg:y="6.51cm" draw:corner-radius="0.055cm">
          <text:p/>
        </draw:rect>
        <draw:frame draw:style-name="gr11" draw:text-style-name="P3" draw:layer="layout" svg:width="11.75cm" svg:height="0.6cm" svg:x="14.8cm" svg:y="6.72cm">
          <draw:text-box>
            <text:p/>
          </draw:text-box>
        </draw:frame>
        <draw:frame draw:style-name="gr12" draw:text-style-name="P3" draw:layer="layout" svg:width="11.75cm" svg:height="1.05cm" svg:x="14.8cm" svg:y="7.23cm">
          <draw:text-box>
            <text:p/>
          </draw:text-box>
        </draw:frame>
        <draw:frame draw:style-name="gr9" draw:text-style-name="P3" draw:layer="layout" svg:width="22cm" svg:height="0.5cm" svg:x="1.1cm" svg:y="14.7cm">
          <draw:text-box>
            <text:p/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rect draw:style-name="gr1" draw:text-style-name="P2" draw:layer="layout" svg:width="28cm" svg:height="15.75cm" svg:x="0cm" svg:y="0cm">
          <text:p/>
        </draw:rect>
        <draw:frame draw:style-name="gr2" draw:text-style-name="P3" draw:layer="layout" svg:width="22cm" svg:height="1.1cm" svg:x="1.1cm" svg:y="0.75cm">
          <draw:text-box>
            <text:p/>
          </draw:text-box>
        </draw:frame>
        <draw:rect draw:style-name="gr3" draw:text-style-name="P4" draw:layer="layout" svg:width="1.8cm" svg:height="0.12cm" svg:x="1.1cm" svg:y="1.75cm" draw:corner-radius="0.06cm">
          <text:p/>
        </draw:rect>
        <draw:frame draw:style-name="gr4" draw:text-style-name="P3" draw:layer="layout" svg:width="24cm" svg:height="1.4cm" svg:x="1.1cm" svg:y="2.05cm">
          <draw:text-box>
            <text:p/>
          </draw:text-box>
        </draw:frame>
        <draw:rect draw:style-name="gr5" draw:text-style-name="P5" draw:layer="layout" svg:width="12.25cm" svg:height="2.35cm" svg:x="1.1cm" svg:y="3.6cm" draw:corner-radius="0.35cm">
          <text:p/>
        </draw:rect>
        <draw:rect draw:style-name="gr3" draw:text-style-name="P4" draw:layer="layout" svg:width="0.9cm" svg:height="0.11cm" svg:x="1.35cm" svg:y="3.86cm" draw:corner-radius="0.055cm">
          <text:p/>
        </draw:rect>
        <draw:frame draw:style-name="gr11" draw:text-style-name="P3" draw:layer="layout" svg:width="11.75cm" svg:height="0.6cm" svg:x="1.35cm" svg:y="4.07cm">
          <draw:text-box>
            <text:p/>
          </draw:text-box>
        </draw:frame>
        <draw:frame draw:style-name="gr12" draw:text-style-name="P3" draw:layer="layout" svg:width="11.75cm" svg:height="1.05cm" svg:x="1.35cm" svg:y="4.58cm">
          <draw:text-box>
            <text:p/>
          </draw:text-box>
        </draw:frame>
        <draw:rect draw:style-name="gr5" draw:text-style-name="P5" draw:layer="layout" svg:width="12.25cm" svg:height="2.35cm" svg:x="14.55cm" svg:y="3.6cm" draw:corner-radius="0.35cm">
          <text:p/>
        </draw:rect>
        <draw:rect draw:style-name="gr13" draw:text-style-name="P7" draw:layer="layout" svg:width="0.9cm" svg:height="0.11cm" svg:x="14.8cm" svg:y="3.86cm" draw:corner-radius="0.055cm">
          <text:p/>
        </draw:rect>
        <draw:frame draw:style-name="gr11" draw:text-style-name="P3" draw:layer="layout" svg:width="11.75cm" svg:height="0.6cm" svg:x="14.8cm" svg:y="4.07cm">
          <draw:text-box>
            <text:p/>
          </draw:text-box>
        </draw:frame>
        <draw:frame draw:style-name="gr12" draw:text-style-name="P3" draw:layer="layout" svg:width="11.75cm" svg:height="1.05cm" svg:x="14.8cm" svg:y="4.58cm">
          <draw:text-box>
            <text:p/>
          </draw:text-box>
        </draw:frame>
        <draw:rect draw:style-name="gr5" draw:text-style-name="P5" draw:layer="layout" svg:width="12.25cm" svg:height="2.35cm" svg:x="1.1cm" svg:y="6.25cm" draw:corner-radius="0.35cm">
          <text:p/>
        </draw:rect>
        <draw:rect draw:style-name="gr14" draw:text-style-name="P8" draw:layer="layout" svg:width="0.9cm" svg:height="0.11cm" svg:x="1.35cm" svg:y="6.51cm" draw:corner-radius="0.055cm">
          <text:p/>
        </draw:rect>
        <draw:frame draw:style-name="gr11" draw:text-style-name="P3" draw:layer="layout" svg:width="11.75cm" svg:height="0.6cm" svg:x="1.35cm" svg:y="6.72cm">
          <draw:text-box>
            <text:p/>
          </draw:text-box>
        </draw:frame>
        <draw:frame draw:style-name="gr12" draw:text-style-name="P3" draw:layer="layout" svg:width="11.75cm" svg:height="1.05cm" svg:x="1.35cm" svg:y="7.23cm">
          <draw:text-box>
            <text:p/>
          </draw:text-box>
        </draw:frame>
        <draw:rect draw:style-name="gr5" draw:text-style-name="P5" draw:layer="layout" svg:width="12.25cm" svg:height="2.35cm" svg:x="14.55cm" svg:y="6.25cm" draw:corner-radius="0.35cm">
          <text:p/>
        </draw:rect>
        <draw:rect draw:style-name="gr15" draw:text-style-name="P9" draw:layer="layout" svg:width="0.9cm" svg:height="0.11cm" svg:x="14.8cm" svg:y="6.51cm" draw:corner-radius="0.055cm">
          <text:p/>
        </draw:rect>
        <draw:frame draw:style-name="gr11" draw:text-style-name="P3" draw:layer="layout" svg:width="11.75cm" svg:height="0.6cm" svg:x="14.8cm" svg:y="6.72cm">
          <draw:text-box>
            <text:p/>
          </draw:text-box>
        </draw:frame>
        <draw:frame draw:style-name="gr12" draw:text-style-name="P3" draw:layer="layout" svg:width="11.75cm" svg:height="1.05cm" svg:x="14.8cm" svg:y="7.23cm">
          <draw:text-box>
            <text:p/>
          </draw:text-box>
        </draw:frame>
        <draw:frame draw:style-name="gr9" draw:text-style-name="P3" draw:layer="layout" svg:width="22cm" svg:height="0.5cm" svg:x="1.1cm" svg:y="14.7cm">
          <draw:text-box>
            <text:p/>
          </draw:text-box>
        </draw:fram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rect draw:style-name="gr1" draw:text-style-name="P2" draw:layer="layout" svg:width="28cm" svg:height="15.75cm" svg:x="0cm" svg:y="0cm">
          <text:p/>
        </draw:rect>
        <draw:frame draw:style-name="gr2" draw:text-style-name="P3" draw:layer="layout" svg:width="22cm" svg:height="1.1cm" svg:x="1.1cm" svg:y="0.75cm">
          <draw:text-box>
            <text:p/>
          </draw:text-box>
        </draw:frame>
        <draw:rect draw:style-name="gr3" draw:text-style-name="P4" draw:layer="layout" svg:width="1.8cm" svg:height="0.12cm" svg:x="1.1cm" svg:y="1.75cm" draw:corner-radius="0.06cm">
          <text:p/>
        </draw:rect>
        <draw:frame draw:style-name="gr4" draw:text-style-name="P3" draw:layer="layout" svg:width="24cm" svg:height="1.4cm" svg:x="1.1cm" svg:y="2.05cm">
          <draw:text-box>
            <text:p/>
          </draw:text-box>
        </draw:frame>
        <draw:rect draw:style-name="gr5" draw:text-style-name="P5" draw:layer="layout" svg:width="12.25cm" svg:height="2.35cm" svg:x="1.1cm" svg:y="3.6cm" draw:corner-radius="0.35cm">
          <text:p/>
        </draw:rect>
        <draw:rect draw:style-name="gr16" draw:text-style-name="P10" draw:layer="layout" svg:width="0.9cm" svg:height="0.11cm" svg:x="1.35cm" svg:y="3.86cm" draw:corner-radius="0.055cm">
          <text:p/>
        </draw:rect>
        <draw:frame draw:style-name="gr11" draw:text-style-name="P3" draw:layer="layout" svg:width="11.75cm" svg:height="0.6cm" svg:x="1.35cm" svg:y="4.07cm">
          <draw:text-box>
            <text:p/>
          </draw:text-box>
        </draw:frame>
        <draw:frame draw:style-name="gr12" draw:text-style-name="P3" draw:layer="layout" svg:width="11.75cm" svg:height="1.05cm" svg:x="1.35cm" svg:y="4.58cm">
          <draw:text-box>
            <text:p/>
          </draw:text-box>
        </draw:frame>
        <draw:rect draw:style-name="gr5" draw:text-style-name="P5" draw:layer="layout" svg:width="12.25cm" svg:height="2.35cm" svg:x="14.55cm" svg:y="3.6cm" draw:corner-radius="0.35cm">
          <text:p/>
        </draw:rect>
        <draw:rect draw:style-name="gr16" draw:text-style-name="P10" draw:layer="layout" svg:width="0.9cm" svg:height="0.11cm" svg:x="14.8cm" svg:y="3.86cm" draw:corner-radius="0.055cm">
          <text:p/>
        </draw:rect>
        <draw:frame draw:style-name="gr11" draw:text-style-name="P3" draw:layer="layout" svg:width="11.75cm" svg:height="0.6cm" svg:x="14.8cm" svg:y="4.07cm">
          <draw:text-box>
            <text:p/>
          </draw:text-box>
        </draw:frame>
        <draw:frame draw:style-name="gr12" draw:text-style-name="P3" draw:layer="layout" svg:width="11.75cm" svg:height="1.05cm" svg:x="14.8cm" svg:y="4.58cm">
          <draw:text-box>
            <text:p/>
          </draw:text-box>
        </draw:frame>
        <draw:rect draw:style-name="gr5" draw:text-style-name="P5" draw:layer="layout" svg:width="12.25cm" svg:height="2.35cm" svg:x="1.1cm" svg:y="6.25cm" draw:corner-radius="0.35cm">
          <text:p/>
        </draw:rect>
        <draw:rect draw:style-name="gr16" draw:text-style-name="P10" draw:layer="layout" svg:width="0.9cm" svg:height="0.11cm" svg:x="1.35cm" svg:y="6.51cm" draw:corner-radius="0.055cm">
          <text:p/>
        </draw:rect>
        <draw:frame draw:style-name="gr11" draw:text-style-name="P3" draw:layer="layout" svg:width="11.75cm" svg:height="0.6cm" svg:x="1.35cm" svg:y="6.72cm">
          <draw:text-box>
            <text:p/>
          </draw:text-box>
        </draw:frame>
        <draw:frame draw:style-name="gr12" draw:text-style-name="P3" draw:layer="layout" svg:width="11.75cm" svg:height="1.05cm" svg:x="1.35cm" svg:y="7.23cm">
          <draw:text-box>
            <text:p/>
          </draw:text-box>
        </draw:frame>
        <draw:rect draw:style-name="gr5" draw:text-style-name="P5" draw:layer="layout" svg:width="12.25cm" svg:height="2.35cm" svg:x="14.55cm" svg:y="6.25cm" draw:corner-radius="0.35cm">
          <text:p/>
        </draw:rect>
        <draw:rect draw:style-name="gr3" draw:text-style-name="P4" draw:layer="layout" svg:width="0.9cm" svg:height="0.11cm" svg:x="14.8cm" svg:y="6.51cm" draw:corner-radius="0.055cm">
          <text:p/>
        </draw:rect>
        <draw:frame draw:style-name="gr11" draw:text-style-name="P3" draw:layer="layout" svg:width="11.75cm" svg:height="0.6cm" svg:x="14.8cm" svg:y="6.72cm">
          <draw:text-box>
            <text:p/>
          </draw:text-box>
        </draw:frame>
        <draw:frame draw:style-name="gr12" draw:text-style-name="P3" draw:layer="layout" svg:width="11.75cm" svg:height="1.05cm" svg:x="14.8cm" svg:y="7.23cm">
          <draw:text-box>
            <text:p/>
          </draw:text-box>
        </draw:frame>
        <draw:frame draw:style-name="gr9" draw:text-style-name="P3" draw:layer="layout" svg:width="22cm" svg:height="0.5cm" svg:x="1.1cm" svg:y="14.7cm">
          <draw:text-box>
            <text:p/>
          </draw:text-box>
        </draw:fram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rect draw:style-name="gr1" draw:text-style-name="P2" draw:layer="layout" svg:width="28cm" svg:height="15.75cm" svg:x="0cm" svg:y="0cm">
          <text:p/>
        </draw:rect>
        <draw:frame draw:style-name="gr2" draw:text-style-name="P3" draw:layer="layout" svg:width="22cm" svg:height="1.1cm" svg:x="1.1cm" svg:y="0.75cm">
          <draw:text-box>
            <text:p/>
          </draw:text-box>
        </draw:frame>
        <draw:rect draw:style-name="gr3" draw:text-style-name="P4" draw:layer="layout" svg:width="1.8cm" svg:height="0.12cm" svg:x="1.1cm" svg:y="1.75cm" draw:corner-radius="0.06cm">
          <text:p/>
        </draw:rect>
        <draw:frame draw:style-name="gr4" draw:text-style-name="P3" draw:layer="layout" svg:width="24cm" svg:height="1.4cm" svg:x="1.1cm" svg:y="2.05cm">
          <draw:text-box>
            <text:p/>
          </draw:text-box>
        </draw:frame>
        <draw:rect draw:style-name="gr5" draw:text-style-name="P5" draw:layer="layout" svg:width="12.25cm" svg:height="2.35cm" svg:x="1.1cm" svg:y="3.6cm" draw:corner-radius="0.35cm">
          <text:p/>
        </draw:rect>
        <draw:rect draw:style-name="gr3" draw:text-style-name="P4" draw:layer="layout" svg:width="0.9cm" svg:height="0.11cm" svg:x="1.35cm" svg:y="3.86cm" draw:corner-radius="0.055cm">
          <text:p/>
        </draw:rect>
        <draw:frame draw:style-name="gr11" draw:text-style-name="P3" draw:layer="layout" svg:width="11.75cm" svg:height="0.6cm" svg:x="1.35cm" svg:y="4.07cm">
          <draw:text-box>
            <text:p/>
          </draw:text-box>
        </draw:frame>
        <draw:frame draw:style-name="gr12" draw:text-style-name="P3" draw:layer="layout" svg:width="11.75cm" svg:height="1.05cm" svg:x="1.35cm" svg:y="4.58cm">
          <draw:text-box>
            <text:p/>
          </draw:text-box>
        </draw:frame>
        <draw:rect draw:style-name="gr5" draw:text-style-name="P5" draw:layer="layout" svg:width="12.25cm" svg:height="2.35cm" svg:x="14.55cm" svg:y="3.6cm" draw:corner-radius="0.35cm">
          <text:p/>
        </draw:rect>
        <draw:rect draw:style-name="gr13" draw:text-style-name="P7" draw:layer="layout" svg:width="0.9cm" svg:height="0.11cm" svg:x="14.8cm" svg:y="3.86cm" draw:corner-radius="0.055cm">
          <text:p/>
        </draw:rect>
        <draw:frame draw:style-name="gr11" draw:text-style-name="P3" draw:layer="layout" svg:width="11.75cm" svg:height="0.6cm" svg:x="14.8cm" svg:y="4.07cm">
          <draw:text-box>
            <text:p/>
          </draw:text-box>
        </draw:frame>
        <draw:frame draw:style-name="gr12" draw:text-style-name="P3" draw:layer="layout" svg:width="11.75cm" svg:height="1.05cm" svg:x="14.8cm" svg:y="4.58cm">
          <draw:text-box>
            <text:p/>
          </draw:text-box>
        </draw:frame>
        <draw:rect draw:style-name="gr5" draw:text-style-name="P5" draw:layer="layout" svg:width="12.25cm" svg:height="2.35cm" svg:x="1.1cm" svg:y="6.25cm" draw:corner-radius="0.35cm">
          <text:p/>
        </draw:rect>
        <draw:rect draw:style-name="gr14" draw:text-style-name="P8" draw:layer="layout" svg:width="0.9cm" svg:height="0.11cm" svg:x="1.35cm" svg:y="6.51cm" draw:corner-radius="0.055cm">
          <text:p/>
        </draw:rect>
        <draw:frame draw:style-name="gr11" draw:text-style-name="P3" draw:layer="layout" svg:width="11.75cm" svg:height="0.6cm" svg:x="1.35cm" svg:y="6.72cm">
          <draw:text-box>
            <text:p/>
          </draw:text-box>
        </draw:frame>
        <draw:frame draw:style-name="gr12" draw:text-style-name="P3" draw:layer="layout" svg:width="11.75cm" svg:height="1.05cm" svg:x="1.35cm" svg:y="7.23cm">
          <draw:text-box>
            <text:p/>
          </draw:text-box>
        </draw:frame>
        <draw:rect draw:style-name="gr5" draw:text-style-name="P5" draw:layer="layout" svg:width="12.25cm" svg:height="2.35cm" svg:x="14.55cm" svg:y="6.25cm" draw:corner-radius="0.35cm">
          <text:p/>
        </draw:rect>
        <draw:rect draw:style-name="gr15" draw:text-style-name="P9" draw:layer="layout" svg:width="0.9cm" svg:height="0.11cm" svg:x="14.8cm" svg:y="6.51cm" draw:corner-radius="0.055cm">
          <text:p/>
        </draw:rect>
        <draw:frame draw:style-name="gr11" draw:text-style-name="P3" draw:layer="layout" svg:width="11.75cm" svg:height="0.6cm" svg:x="14.8cm" svg:y="6.72cm">
          <draw:text-box>
            <text:p/>
          </draw:text-box>
        </draw:frame>
        <draw:frame draw:style-name="gr12" draw:text-style-name="P3" draw:layer="layout" svg:width="11.75cm" svg:height="1.05cm" svg:x="14.8cm" svg:y="7.23cm">
          <draw:text-box>
            <text:p/>
          </draw:text-box>
        </draw:frame>
        <draw:rect draw:style-name="gr5" draw:text-style-name="P5" draw:layer="layout" svg:width="12.25cm" svg:height="2.35cm" svg:x="1.1cm" svg:y="8.9cm" draw:corner-radius="0.35cm">
          <text:p/>
        </draw:rect>
        <draw:rect draw:style-name="gr3" draw:text-style-name="P4" draw:layer="layout" svg:width="0.9cm" svg:height="0.11cm" svg:x="1.35cm" svg:y="9.16cm" draw:corner-radius="0.055cm">
          <text:p/>
        </draw:rect>
        <draw:frame draw:style-name="gr11" draw:text-style-name="P3" draw:layer="layout" svg:width="11.75cm" svg:height="0.6cm" svg:x="1.35cm" svg:y="9.37cm">
          <draw:text-box>
            <text:p/>
          </draw:text-box>
        </draw:frame>
        <draw:frame draw:style-name="gr12" draw:text-style-name="P3" draw:layer="layout" svg:width="11.75cm" svg:height="1.05cm" svg:x="1.35cm" svg:y="9.88cm">
          <draw:text-box>
            <text:p/>
          </draw:text-box>
        </draw:frame>
        <draw:frame draw:style-name="gr9" draw:text-style-name="P3" draw:layer="layout" svg:width="22cm" svg:height="0.5cm" svg:x="1.1cm" svg:y="14.7cm">
          <draw:text-box>
            <text:p/>
          </draw:text-box>
        </draw:fram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5-25T20:39:21.790417621</meta:creation-date>
    <dc:date>2026-05-25T20:39:23.218417836</dc:date>
    <meta:editing-duration>PT4S</meta:editing-duration>
    <meta:editing-cycles>1</meta:editing-cycles>
    <meta:document-statistic meta:object-count="247"/>
    <meta:generator>LibreOffice/7.3.7.2$Linux_X86_64 LibreOffice_project/30$Build-2</meta:generator>
  </office:meta>
</office:document-meta>
</file>